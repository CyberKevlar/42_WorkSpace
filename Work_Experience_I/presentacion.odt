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officeooo:paragraph-rsid="000f23c5" style:font-size-asian="12pt" style:font-size-complex="12pt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Heading_20_1">
      <style:text-properties fo:font-size="12pt" style:font-size-asian="10.5pt" style:font-size-complex="12pt"/>
    </style:style>
    <style:style style:name="P8" style:family="paragraph" style:parent-style-name="Text_20_body">
      <style:text-properties fo:font-size="12pt" style:font-size-asian="10.5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officeooo:paragraph-rsid="000fcaa3"/>
    </style:style>
    <style:style style:name="P13" style:family="paragraph" style:parent-style-name="Quotations">
      <style:text-properties officeooo:paragraph-rsid="000fcaa3"/>
    </style:style>
    <style:style style:name="P14" style:family="paragraph" style:parent-style-name="Horizontal_20_Line">
      <style:text-properties fo:font-size="12pt" style:font-size-asian="10.5pt" style:font-size-complex="12pt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Quotations">
      <style:text-properties officeooo:paragraph-rsid="00116456"/>
    </style:style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T1" style:family="text">
      <style:text-properties officeooo:rsid="000f23c5"/>
    </style:style>
    <style:style style:name="T2" style:family="text">
      <style:text-properties officeooo:rsid="000fcaa3"/>
    </style:style>
    <style:style style:name="T3" style:family="text">
      <style:text-properties officeooo:rsid="0011645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APOSITIVA 1</text:h>
      <text:h text:style-name="Heading_20_1" text:outline-level="1">Presentación</text:h>
      <text:h text:style-name="Heading_20_3" text:outline-level="3">Contenido</text:h>
      <text:list text:style-name="L1">
        <text:list-item>
          <text:p text:style-name="P1">Juan Carlos Martos </text:p>
        </text:list-item>
        <text:list-item>
          <text:p text:style-name="P1">42 Málaga </text:p>
        </text:list-item>
        <text:list-item>
          <text:p text:style-name="P1">Alenia Consulting </text:p>
        </text:list-item>
        <text:list-item>
          <text:p text:style-name="P2">Santander CIB </text:p>
        </text:list-item>
      </text:list>
      <text:h text:style-name="Heading_20_3" text:outline-level="3">Guion</text:h>
      <text:p text:style-name="Quotations">Buenas tardes.</text:p>
      <text:p text:style-name="Quotations">Mi nombre es Juan Carlos Martos y actualmente soy estudiante de 42 Málaga <text:span text:style-name="T1">y empleado en una consultora tecnológica dando soporte técnico al sector bancario.</text:span></text:p>
      <text:p text:style-name="Quotations"><text:span text:style-name="T1">Tras mi estancia en el campus de 42 Málaga y tras un proceso de reclutamiento encontré mi</text:span> primera experiencia profesional <text:span text:style-name="T1">con el equipo de</text:span> Alenia Consulting, una empresa especializada en consultoría y servicios tecnológicos.</text:p>
      <text:p text:style-name="Quotations">A través de Alenia fui asignado a <text:span text:style-name="T1">SDS ó Santander Digital Services, la división tecnológica de Banco Santander, </text:span>donde trabajo actualmente en tareas relacionadas con soporte de aplicaciones, monitorización de procesos y análisis de datos.</text:p>
      <text:p text:style-name="Quotations">En esta presentación explicaré <text:span text:style-name="T1">mi</text:span> entorno <text:span text:style-name="T1">de</text:span> trabajo <text:span text:style-name="T1">un dia corriente (y no tan corriente)</text:span>, las responsabilidades de mi equipo, algunos de los proyectos en los que he participado y los conocimientos que he adquirido durante esta experiencia.</text:p>
      <text:p text:style-name="Horizontal_20_Line"/>
      <text:h text:style-name="P3" text:outline-level="1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DIAPOSITIVA 2</text:h>
      <text:h text:style-name="Heading_20_1" text:outline-level="1">Entorno profesional</text:h>
      <text:h text:style-name="Heading_20_3" text:outline-level="3">Contenido</text:h>
      <text:section text:style-name="Sect1" text:name="code-block-viewer">
        <text:p text:style-name="P5"><text:span text:style-name="Source_20_Text">42 Málaga</text:span></text:p>
        <text:p text:style-name="Preformatted_20_Text"><text:span text:style-name="Source_20_Text"><text:s text:c="6"/>↓</text:span></text:p>
        <text:p text:style-name="Preformatted_20_Text"><text:span text:style-name="Source_20_Text">Alenia Consulting</text:span></text:p>
        <text:p text:style-name="Preformatted_20_Text"><text:span text:style-name="Source_20_Text"><text:s text:c="6"/>↓</text:span></text:p>
        <text:p text:style-name="P6"><text:span text:style-name="Source_20_Text">Santander CIB</text:span></text:p>
      </text:section>
      <text:h text:style-name="Heading_20_3" text:outline-level="3">Guion</text:h>
      <text:p text:style-name="Quotations">Esta experiencia me ha permitido aplicar en un entorno profesional muchos de los conocimientos adquiridos durante mi formación en 42 Málaga, <text:span text:style-name="T2">pero sobre todo lo que mas he aprendido y usado es el trabajo en equipo.</text:span></text:p>
      <text:p text:style-name="Quotations"><text:span text:style-name="T2">Como ya e comentado, </text:span>Alenia proporciona servicios tecnológicos y de consultoría a diferentes organizaciones. <text:span text:style-name="T2">Y d</text:span>entro de este m<text:span text:style-name="T2">arco, en SDS, </text:span>trabajo para Santander CIB, la división de banca corporativa y de inversión del Grupo Santander.</text:p>
      <text:p text:style-name="Quotations">Gracias a esta estructura he podido conocer tanto el funcionamiento “<text:span text:style-name="T2">más pequeño</text:span>” de una consultora tecnológica como el “<text:span text:style-name="T2">gigantesco </text:span>”de una gran entidad financiera internacional.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3</text:h>
      <text:h text:style-name="Heading_20_1" text:outline-level="1">¿Qué es Santander <text:span text:style-name="T2">S</text:span>CIB?</text:h>
      <text:h text:style-name="Heading_20_3" text:outline-level="3">Contenido</text:h>
      <text:list text:style-name="L2">
        <text:list-item>
          <text:p text:style-name="P9">Banca corporativa y de inversión </text:p>
        </text:list-item>
        <text:list-item>
          <text:p text:style-name="P9">Mercados financieros internacionales </text:p>
        </text:list-item>
        <text:list-item>
          <text:p text:style-name="P9">Procesamiento de información financiera </text:p>
        </text:list-item>
        <text:list-item>
          <text:p text:style-name="P10">Servicios globales </text:p>
        </text:list-item>
      </text:list>
      <text:h text:style-name="Heading_20_3" text:outline-level="3">Guion</text:h>
      <text:p text:style-name="Quotations">Santander CIB es la división encargada de ofrecer servicios financieros a grandes empresas, instituciones y clientes corporativos.</text:p>
      <text:p text:style-name="Quotations">Su actividad depende del intercambio y procesamiento de grandes cantidades de información financiera procedente de múltiples mercados y sistemas.</text:p>
      <text:p text:style-name="Quotations">Por ello, la disponibilidad, calidad y fiabilidad de los datos son elementos fundamentales para el correcto funcionamiento de la organización.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4</text:h>
      <text:h text:style-name="Heading_20_1" text:outline-level="1">Mi equipo <text:span text:style-name="T2">y nuestras resposabilidades</text:span></text:h>
      <text:h text:style-name="Heading_20_3" text:outline-level="3">Contenido</text:h>
      <text:p text:style-name="Text_20_body"><text:span text:style-name="Strong_20_Emphasis">SGT_CR_SCIB_CS_REGULATORY_L1</text:span></text:p>
      <text:list text:style-name="L3">
        <text:list-item>
          <text:p text:style-name="P11">Servicios Gestionados Tecnológicos </text:p>
        </text:list-item>
        <text:list-item>
          <text:p text:style-name="P11">Control Risk </text:p>
        </text:list-item>
        <text:list-item>
          <text:p text:style-name="P11">Santander CIB </text:p>
        </text:list-item>
        <text:list-item>
          <text:p text:style-name="P11">Control de S<text:span text:style-name="T2">oporte de</text:span> Regulatorios </text:p>
        </text:list-item>
        <text:list-item>
          <text:p text:style-name="P12">Soporte Nivel 1 </text:p>
        </text:list-item>
      </text:list>
      <text:h text:style-name="Heading_20_3" text:outline-level="3">Guion</text:h>
      <text:p text:style-name="Quotations">Dentro de Santander formo parte del equipo SGT_CR_SCIB_CS_REGULATORY_L1.</text:p>
      <text:p text:style-name="Quotations">Este nombre identifica el área y las funciones que desempeñamos dentro de la organización.</text:p>
      <text:p text:style-name="Quotations">Nuestro equipo pertenece al área de Servicios Gestionados Tecnológicos y está enfocado en procesos relacionados con <text:span text:style-name="T2">el control de riesgos </text:span>y servicios regulatorios dentro de Santander CIB. </text:p>
      <text:p text:style-name="P13">Como equipo de soporte de primer nivel, somos responsables de la supervisión inicial de procesos, <text:span text:style-name="T2">el control de que se respeten los tiempos de ejecución, la detección de incidencias</text:span> y la coordinación con otros equipos <text:span text:style-name="T2">técnico</text:span> cuando es necesario realizar análisis más profundos.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5</text:h>
      <text:h text:style-name="Heading_20_1" text:outline-level="1">Responsabilidades del equipo</text:h>
      <text:h text:style-name="Heading_20_3" text:outline-level="3">Contenido</text:h>
      <text:list text:style-name="L4">
        <text:list-item>
          <text:p text:style-name="P15">Monitorización de procesos </text:p>
        </text:list-item>
        <text:list-item>
          <text:p text:style-name="P15">Seguimiento de flujos de datos </text:p>
        </text:list-item>
        <text:list-item>
          <text:p text:style-name="P15">Gestión de incidencias </text:p>
        </text:list-item>
        <text:list-item>
          <text:p text:style-name="P15">Soporte a usuarios </text:p>
        </text:list-item>
        <text:list-item>
          <text:p text:style-name="P16">Escalado de problemas </text:p>
        </text:list-item>
      </text:list>
      <text:h text:style-name="Heading_20_3" text:outline-level="3">Guion</text:h>
      <text:p text:style-name="Quotations">La principal misión de nuestro equipo es garantizar que los procesos regulatorios <text:span text:style-name="T2">se cumplan</text:span> y los flujos de información funcionen correctamente <text:span text:style-name="T2">del punto A al B sin alteración.</text:span></text:p>
      <text:p text:style-name="Quotations">Para ello realizamos tareas de monitorización continua, identificamos posibles incidencias y colaboramos con distintos equipos <text:span text:style-name="T2">de niveles superiores</text:span> para resolverlas.</text:p>
      <text:p text:style-name="Quotations">También proporcionamos soporte a usuarios y realizamos el seguimiento de <text:span text:style-name="T2">incidencias</text:span> hasta su resolución.</text:p>
      <text:p text:style-name="Quotations">Cuando una incidencia requiere conocimientos especializados, coordinamos su escalado a equipos de segundo o tercer nivel, <text:span text:style-name="T2">o incluso escalamos a nuestro manager para apertura de incidencias de nivel superior.</text:span>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6</text:h>
      <text:h text:style-name="Heading_20_1" text:outline-level="1">Mi trabajo diario</text:h>
      <text:h text:style-name="Heading_20_3" text:outline-level="3">Contenido</text:h>
      <text:list text:style-name="L5">
        <text:list-item>
          <text:p text:style-name="P17">Supervisión de procesos </text:p>
        </text:list-item>
        <text:list-item>
          <text:p text:style-name="P17">Análisis de incidencias </text:p>
        </text:list-item>
        <text:list-item>
          <text:p text:style-name="P17">Validación de datos </text:p>
        </text:list-item>
        <text:list-item>
          <text:p text:style-name="P17">Comunicación entre equipos </text:p>
        </text:list-item>
        <text:list-item>
          <text:p text:style-name="P18">Documentación </text:p>
        </text:list-item>
      </text:list>
      <text:h text:style-name="Heading_20_3" text:outline-level="3">Guion</text:h>
      <text:p text:style-name="Quotations"><text:span text:style-name="T3">Mi perfil en</text:span> <text:span text:style-name="T3">una jornada consiste</text:span> en el seguimiento de diferentes procesos <text:span text:style-name="T3">de las diferentes fuentes y aplicaciones que nuestro equipo tiene contratadas para garantizar que la información se entregue en forma y tiempos establecidos.</text:span></text:p>
      <text:p text:style-name="Quotations">Una parte importante de mi trabajo <text:span text:style-name="T3">tambien</text:span> consiste en <text:span text:style-name="T3">predecir y </text:span>analizar incidencias cuando se detectan errores o comportamientos inesperados. Para ello reviso registros, recopilo información y colaboro con otros equipos para localizar el origen del problema.</text:p>
      <text:p text:style-name="Quotations">Además, participo en tareas de validación de datos y documentación de procedimientos, contribuyendo a mejorar la estabilidad de los servicios <text:span text:style-name="T3">y el workflow de las soluciones.</text:span>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7</text:h>
      <text:h text:style-name="Heading_20_1" text:outline-level="1">Tecnologías utilizadas</text:h>
      <text:h text:style-name="Heading_20_3" text:outline-level="3">Contenido</text:h>
      <text:list text:style-name="L6">
        <text:list-item>
          <text:p text:style-name="P19">Linux </text:p>
        </text:list-item>
        <text:list-item>
          <text:p text:style-name="P19">Herramientas de monitorización </text:p>
        </text:list-item>
        <text:list-item>
          <text:p text:style-name="P19">Aplicaciones corporativas </text:p>
        </text:list-item>
        <text:list-item>
          <text:p text:style-name="P19">Análisis de datos </text:p>
        </text:list-item>
        <text:list-item>
          <text:p text:style-name="P20">Gestión de incidencias </text:p>
        </text:list-item>
      </text:list>
      <text:h text:style-name="Heading_20_3" text:outline-level="3">Guion</text:h>
      <text:p text:style-name="P21"><text:span text:style-name="T3">P</text:span>rincipalmente <text:span text:style-name="T3">trabajamos en herramientas internas de monitorización, como Control-M, para controlar la ejecucion de las mallas de información de los aplicativos.</text:span></text:p>
      <text:p text:style-name="P21"><text:span text:style-name="T3">Asi mismo usamos</text:span> entornos Linux y diferentes herramientas corporativas utilizadas <text:span text:style-name="T3">también para</text:span> la monitorización y el análisis de procesos.</text:p>
      <text:p text:style-name="Quotations"><text:span text:style-name="T3">He</text:span> tenido la oportunidad de aprender cómo se gestionan las incidencias dentro de una gran organización y cómo colaboran múltiples equipos para mantener la continuidad de los servicios.</text:p>
      <text:p text:style-name="Quotations">Esta experiencia me ha permitido desarrollar tanto competencias técnicas como habilidades de comunicación y trabajo en equipo <text:span text:style-name="T3">para ir resolviendo una incidencia cuando va saltando de equipo en equipo y de nivel de soporte.</text:span>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8</text:h>
      <text:h text:style-name="Heading_20_1" text:outline-level="1">Retos y aprendizajes</text:h>
      <text:h text:style-name="Heading_20_3" text:outline-level="3">Contenido</text:h>
      <text:list text:style-name="L7">
        <text:list-item>
          <text:p text:style-name="P22">Entorno profesional real </text:p>
        </text:list-item>
        <text:list-item>
          <text:p text:style-name="P22">Trabajo en equipo </text:p>
        </text:list-item>
        <text:list-item>
          <text:p text:style-name="P22">Resolución de problemas </text:p>
        </text:list-item>
        <text:list-item>
          <text:p text:style-name="P22">Gestión de incidencias </text:p>
        </text:list-item>
        <text:list-item>
          <text:p text:style-name="P23">Responsabilidad operativa </text:p>
        </text:list-item>
      </text:list>
      <text:h text:style-name="Heading_20_3" text:outline-level="3">Guion</text:h>
      <text:p text:style-name="Quotations">Uno de los mayores retos fue adaptarme a un entorno profesional con procesos complejos, <text:span text:style-name="T3">herramientas corporativas </text:span>y servicios críticos para el negocio, <text:span text:style-name="T3">con todo el estrés y la presión que ello conlleva.</text:span></text:p>
      <text:p text:style-name="Quotations">Aprendí a trabajar de forma coordinada con diferentes equipos <text:span text:style-name="T3">para</text:span> a investigar incidencias de manera estructurada y a comprender la importancia de una buena comunicación dentro de una organización tecnológica.</text:p>
      <text:p text:style-name="Quotations">También mejoré mi capacidad para analizar problemas y buscar soluciones de forma eficiente.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9</text:h>
      <text:h text:style-name="Heading_20_1" text:outline-level="1">Relación con 42</text:h>
      <text:h text:style-name="Heading_20_3" text:outline-level="3">Contenido</text:h>
      <text:list text:style-name="L8">
        <text:list-item>
          <text:p text:style-name="P24">Aprendizaje autónomo </text:p>
        </text:list-item>
        <text:list-item>
          <text:p text:style-name="P24">Resolución de problemas </text:p>
        </text:list-item>
        <text:list-item>
          <text:p text:style-name="P24">Trabajo colaborativo </text:p>
        </text:list-item>
        <text:list-item>
          <text:p text:style-name="P25">Adaptación tecnológica </text:p>
        </text:list-item>
      </text:list>
      <text:h text:style-name="Heading_20_3" text:outline-level="3">Guion</text:h>
      <text:p text:style-name="Quotations">Muchas de las habilidades desarrolladas en 42 Málaga han resultado especialmente útiles durante esta experiencia.</text:p>
      <text:p text:style-name="Quotations">La capacidad de aprender de forma autónoma, <text:span text:style-name="T3">de preguntar a los veteranos para aprender, de</text:span> investigar problemas y colaborar con otras personas son aspectos que forman parte tanto de la metodología de 42 como de mi trabajo diario.</text:p>
      <text:p text:style-name="Quotations">Esta experiencia <text:span text:style-name="T3">ha sido crucial y </text:span>me ha permitido comprobar cómo esos conocimientos pueden aplicarse en un entorno profesional real.</text:p>
      <text:p text:style-name="Horizontal_20_Line"/>
      <text:h text:style-name="P7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POSITIVA 10</text:h>
      <text:h text:style-name="Heading_20_1" text:outline-level="1">Conclusión <text:span text:style-name="T3">y final</text:span></text:h>
      <text:h text:style-name="Heading_20_3" text:outline-level="3">Contenido</text:h>
      <text:list text:style-name="L9">
        <text:list-item>
          <text:p text:style-name="P26">Crecimiento profesional </text:p>
        </text:list-item>
        <text:list-item>
          <text:p text:style-name="P26">Aprendizaje continuo </text:p>
        </text:list-item>
        <text:list-item>
          <text:p text:style-name="P26">Nuevos retos </text:p>
        </text:list-item>
        <text:list-item>
          <text:p text:style-name="P27">Futuro profesional </text:p>
        </text:list-item>
      </text:list>
      <text:h text:style-name="Heading_20_3" text:outline-level="3">Guion</text:h>
      <text:p text:style-name="Quotations">Para concluir, esta primera experiencia profesional ha supuesto una gran oportunidad de aprendizaje y crecimiento.</text:p>
      <text:p text:style-name="Quotations">Me ha permitido conocer el funcionamiento de una gran organización tecnológica, desarrollar nuevas competencias y aplicar conocimientos adquiridos durante mi formación en 42 Málaga.</text:p>
      <text:p text:style-name="Quotations">Estoy muy agradecido <text:span text:style-name="T3">primero a 42 Málaga por la implantacion innovadora de su tecnología y de su porterior dedicación a la insercion laboral. Y por supuesto</text:span> Alenia Consulting como a <text:span text:style-name="T3">Grupo </text:span>Santander por la confianza depositada en mí y espero seguir creciendo profesionalmente afrontando nuevos retos en el futuro.</text:p>
      <text:p text:style-name="P21">Muchas gracias por vuestra atenció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8:30:49.474762386</meta:creation-date>
    <dc:date>2026-07-10T20:18:06.467346945</dc:date>
    <meta:editing-duration>PT1H13M18S</meta:editing-duration>
    <meta:editing-cycles>1</meta:editing-cycles>
    <meta:document-statistic meta:table-count="0" meta:image-count="0" meta:object-count="0" meta:page-count="10" meta:paragraph-count="123" meta:word-count="1141" meta:character-count="7719" meta:non-whitespace-character-count="6688"/>
    <meta:generator>LibreOffice/25.8.7.3$Linux_X86_64 LibreOffice_project/580$Build-3</meta:generator>
  </office:meta>
</office:document-meta>
</file>